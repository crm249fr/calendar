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80548F5DCA.png" manifest:media-type="image/png"/>
  <manifest:file-entry manifest:full-path="Pictures/10000001000004B0000002A3339D9F5E.png" manifest:media-type="image/png"/>
  <manifest:file-entry manifest:full-path="Pictures/10000001000003D4000003D408F09DD6.png" manifest:media-type="image/png"/>
  <manifest:file-entry manifest:full-path="Pictures/10000001000003BA00000139610BEC56.png" manifest:media-type="image/png"/>
  <manifest:file-entry manifest:full-path="Pictures/10000001000002E4000002E46F0CBF6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r4" style:family="presentation" style:parent-style-name="Обычный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111111" loext:opacity="100%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color="#111111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7.999cm" svg:height="15.748cm" svg:x="0cm" svg:y="0.002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Smart Notes</text:span></text:p>
          </draw:text-box>
        </draw:frame>
        <draw:frame draw:style-name="gr1" draw:text-style-name="P1" draw:layer="layout" svg:width="12cm" svg:height="12cm" svg:x="8cm" svg:y="3cm">
          <draw:image xlink:href="Pictures/100000010000028000000280548F5D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2cm" svg:y="0.043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Цели и задачи </text:p>
          </draw:text-box>
        </draw:frame>
        <draw:frame presentation:style-name="pr3" draw:layer="layout" svg:width="15cm" svg:height="12.25cm" svg:x="0cm" svg:y="3.5cm" presentation:class="outline" presentation:user-transformed="true">
          <draw:text-box>
            <text:list text:style-name="L2">
              <text:list-item>
                <text:p><text:span text:style-name="T2">Целью было научится использовать API</text:span><text:span text:style-name="T2"><text:line-break/></text:span><text:span text:style-name="T2">Yandex AI и научится создавать телеграмм ботов.</text:span><text:span text:style-name="T2"><text:line-break/></text:span><text:span text:style-name="T2"><text:line-break/></text:span><text:span text:style-name="T2">Задачей бота является напоминание</text:span><text:span text:style-name="T3"> и помощь при подборе подарков в зависимости от того что ты хочешь от подарка.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 <text:s/></text:p>
              </text:list-item>
            </text:list>
          </draw:text-box>
        </draw:frame>
        <draw:frame draw:style-name="gr1" draw:text-style-name="P1" draw:layer="layout" svg:width="12cm" svg:height="12cm" svg:x="15.5cm" svg:y="3.257cm">
          <draw:image xlink:href="Pictures/10000001000003D4000003D408F09D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2cm" svg:y="0.043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Актуальность</text:p>
          </draw:text-box>
        </draw:frame>
        <draw:frame presentation:style-name="pr3" draw:layer="layout" svg:width="12cm" svg:height="12.106cm" svg:x="16.061cm" svg:y="3.644cm" presentation:class="outline" presentation:user-transformed="true">
          <draw:text-box>
            <text:list text:style-name="L2">
              <text:list-item>
                <text:p text:style-name="P4"><text:span text:style-name="T4">Актуальность нашего телеграмм бота заключается в том что бы облегчить работу при собеседованиях. Примеры:</text:span><text:span text:style-name="T4"><text:line-break/></text:span><text:span text:style-name="T4"><text:line-break/></text:span><text:span text:style-name="T4">1) Напоминания нужны чтобы запоминать в телеграмме они будут на и более удобные из за частого использования телеграмма.</text:span><text:span text:style-name="T4"><text:line-break/></text:span><text:span text:style-name="T4"><text:line-break/></text:span><text:span text:style-name="T4">2) Помощь с выборами подарков также нужны чтобы например задобрить человека удивить его или наоборот сделать самый простой, но хороший подарок.</text:span></text:p>
              </text:list-item>
            </text:list>
          </draw:text-box>
        </draw:frame>
        <draw:frame draw:style-name="gr1" draw:text-style-name="P1" draw:layer="layout" svg:width="16.5cm" svg:height="5.413cm" svg:x="0cm" svg:y="5.087cm">
          <draw:image xlink:href="Pictures/10000001000003BA00000139610BEC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2cm" svg:y="0.043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>
          <draw:text-box>
            <text:p>Использованные технологии</text:p>
          </draw:text-box>
        </draw:frame>
        <draw:frame presentation:style-name="pr3" draw:text-style-name="P6" draw:layer="layout" svg:width="9.938cm" svg:height="12.106cm" svg:x="0.062cm" svg:y="3.679cm" presentation:class="outline" presentation:user-transformed="true">
          <draw:text-box>
            <text:list text:style-name="L2">
              <text:list-item>
                <text:p text:style-name="P5"><text:span text:style-name="T5">python-telegram-bot[job-queue]</text:span><text:span text:style-name="T5"><text:line-break/></text:span><text:span text:style-name="T5"><text:line-break/></text:span><text:span text:style-name="T5">apscheduler </text:span><text:span text:style-name="T6"><text:line-break/></text:span><text:span text:style-name="T6"><text:line-break/></text:span><text:span text:style-name="T6">flask <text:s/></text:span><text:span text:style-name="T6"><text:line-break/></text:span><text:span text:style-name="T6"><text:line-break/></text:span><text:span text:style-name="T6">flask-cors</text:span><text:span text:style-name="T6"><text:line-break/></text:span><text:span text:style-name="T6"><text:line-break/></text:span><text:span text:style-name="T6">requests</text:span></text:p>
              </text:list-item>
            </text:list>
          </draw:text-box>
        </draw:frame>
        <draw:frame draw:style-name="gr3" draw:text-style-name="P7" draw:layer="layout" svg:width="12.246cm" svg:height="12.246cm" svg:x="12.254cm" svg:y="3.254cm">
          <draw:image xlink:href="Pictures/10000001000002E4000002E46F0CBF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42.06cm" svg:height="23.58cm" svg:x="-7cm" svg:y="-1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-0.973cm" presentation:class="title" presentation:user-transformed="true">
          <draw:text-box>
            <text:p>Пример работы </text:p>
          </draw:text-box>
        </draw:frame>
        <draw:frame draw:name="Медиаобъект 2" draw:style-name="gr4" draw:layer="layout" svg:width="9.5cm" svg:height="20.645cm" svg:x="8.5cm" svg:y="1.5cm">
          <draw:plugin xlink:href="../../Downloads/F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2cm" svg:y="0.043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>
          <draw:text-box>
            <text:p>Заключение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Мы научились использовать API Yandex AI и<text:line-break/>Telegram<text:line-break/>И бот выполняет поставленные ему задачи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3cm" svg:y="0.043cm">
          <draw:image xlink:href="Pictures/10000001000004B0000002A3339D9F5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Наш проект можно найти по сылке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github.com/crm249fr/calend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5T12:43:22.773833100</meta:creation-date>
    <dc:date>2026-05-17T15:47:29.595051400</dc:date>
    <meta:editing-duration>PT1H10M45S</meta:editing-duration>
    <meta:editing-cycles>11</meta:editing-cycles>
    <meta:generator>LibreOffice/26.2.3.2$Windows_X86_64 LibreOffice_project/70e089b17412e4cb7773e41413306b17a2328c34</meta:generator>
    <meta:document-statistic meta:object-count="59"/>
  </office:meta>
</office:document-meta>
</file>